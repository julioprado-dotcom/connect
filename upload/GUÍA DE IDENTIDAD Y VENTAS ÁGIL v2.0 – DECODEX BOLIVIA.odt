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2.251cm"/>
    </style:style>
    <style:style style:name="Tabla1.B" style:family="table-column">
      <style:table-column-properties style:column-width="3.567cm"/>
    </style:style>
    <style:style style:name="Tabla1.C" style:family="table-column">
      <style:table-column-properties style:column-width="6.052cm"/>
    </style:style>
    <style:style style:name="Tabla1.D" style:family="table-column">
      <style:table-column-properties style:column-width="5.7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cm" fo:margin-bottom="0cm" style:contextual-spacing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5"/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5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GUÍA DE IDENTIDAD Y VENTAS ÁGIL v2.0 – DECODEX BOLIVIA</text:h>
      <text:h text:style-name="Heading_20_3" text:outline-level="3"><text:span text:style-name="Emphasis">Estrategia Híbrida: Institucional para Ventas, Sci-Fi para Producto</text:span></text:h>
      <text:p text:style-name="P19"><text:span text:style-name="Strong_20_Emphasis">Versión:</text:span> 2.0 (Beta Operativa) | <text:span text:style-name="Strong_20_Emphasis">Fecha:</text:span> Mayo 2026 | <text:span text:style-name="Strong_20_Emphasis">Estado:</text:span> En Implementación</text:p>
      <text:p text:style-name="Horizontal_20_Line"/>
      <text:h text:style-name="Heading_20_2" text:outline-level="2">1. FILOSOFÍA: IDENTIDAD DUAL INTELIGENTE</text:h>
      <text:p text:style-name="P19">DECODEX opera con dos caras de una misma moneda. No hay conflicto, hay estrategi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94490212181616">
            <table:table-cell table:style-name="Tabla1.A1" office:value-type="string">
              <text:p text:style-name="P4">Capa</text:p>
            </table:table-cell>
            <table:table-cell table:style-name="Tabla1.A1" office:value-type="string">
              <text:p text:style-name="P4">Contexto</text:p>
            </table:table-cell>
            <table:table-cell table:style-name="Tabla1.A1" office:value-type="string">
              <text:p text:style-name="P4">Estética</text:p>
            </table:table-cell>
            <table:table-cell table:style-name="Tabla1.A1" office:value-type="string">
              <text:p text:style-name="P4">Objetivo</text:p>
            </table:table-cell>
          </table:table-row>
        </table:table-header-rows>
        <table:table-row table:style-name="TableLine94490212181616">
          <table:table-cell table:style-name="Tabla1.A1" office:value-type="string">
            <text:p text:style-name="P3"><text:span text:style-name="Strong_20_Emphasis">CAPA A: INSTITUCIONAL</text:span></text:p>
          </table:table-cell>
          <table:table-cell table:style-name="Tabla1.A1" office:value-type="string">
            <text:p text:style-name="P3">Ventas, Propuestas, LinkedIn, Emails, Contratos.</text:p>
          </table:table-cell>
          <table:table-cell table:style-name="Tabla1.A1" office:value-type="string">
            <text:p text:style-name="P3"><text:span text:style-name="Strong_20_Emphasis">Corporate Clean:</text:span> Navy Blue (<text:span text:style-name="Source_20_Text">#0F2027</text:span>), Blanco, acentos Naranja (<text:span text:style-name="Source_20_Text">#FF862F</text:span>). Tipografías: Montserrat/Roboto.</text:p>
          </table:table-cell>
          <table:table-cell table:style-name="Tabla1.A1" office:value-type="string">
            <text:p text:style-name="P3">Transmitir <text:span text:style-name="Strong_20_Emphasis">confianza, solidez y seriedad</text:span> a tomadores de decisiones tradicionales (Ministros, CEOs).</text:p>
          </table:table-cell>
        </table:table-row>
        <table:table-row table:style-name="TableLine94490212181616">
          <table:table-cell table:style-name="Tabla1.A1" office:value-type="string">
            <text:p text:style-name="P3"><text:span text:style-name="Strong_20_Emphasis">CAPA B: PRODUCTO</text:span></text:p>
          </table:table-cell>
          <table:table-cell table:style-name="Tabla1.A1" office:value-type="string">
            <text:p text:style-name="P3">Dashboard, Alertas, App, Experiencia de Usuario.</text:p>
          </table:table-cell>
          <table:table-cell table:style-name="Tabla1.A1" office:value-type="string">
            <text:p text:style-name="P3"><text:span text:style-name="Strong_20_Emphasis">Tactical Sci-Fi:</text:span> Dark Mode, Neon Emerald/Red, Glassmorphism, Monospace.</text:p>
          </table:table-cell>
          <table:table-cell table:style-name="Tabla1.A1" office:value-type="string">
            <text:p text:style-name="P3">Transmitir <text:span text:style-name="Strong_20_Emphasis">tecnología punta, velocidad y capacidad de análisis</text:span> en tiempo real.</text:p>
          </table:table-cell>
        </table:table-row>
      </table:table>
      <text:p text:style-name="Quotations"><text:span text:style-name="Strong_20_Emphasis">Regla de Oro:</text:span> El cliente compra por la <text:span text:style-name="Strong_20_Emphasis">Capa A</text:span> (confianza institucional) pero se enamora y renueva por la <text:span text:style-name="Strong_20_Emphasis">Capa B</text:span> (experiencia tecnológica).</text:p>
      <text:p text:style-name="Horizontal_20_Line"/>
      <text:h text:style-name="Heading_20_2" text:outline-level="2">2. SISTEMA VISUAL ACTUALIZADO (MÍNIMO VIABLE)</text:h>
      <text:h text:style-name="Heading_20_3" text:outline-level="3">2.1 Paleta Unificada</text:h>
      <text:p text:style-name="Text_20_body">Usamos la paleta corporativa para todo lo externo, pero permitimos el modo oscuro nativo del dashboard para lo interno.</text:p>
      <text:list xml:id="list1472613157" text:style-name="L1">
        <text:list-item>
          <text:p text:style-name="P20"><text:span text:style-name="Strong_20_Emphasis">Primario (Marca):</text:span> <text:span text:style-name="Source_20_Text">Navy DECODEX</text:span> (#0F2027) - Usar en logos, headers de PDFs, firmas.</text:p>
        </text:list-item>
        <text:list-item>
          <text:p text:style-name="P20"><text:span text:style-name="Strong_20_Emphasis">Acción (CTA):</text:span> <text:span text:style-name="Source_20_Text">Orange Vibrante</text:span> (#FF862F) - Botones de "Agendar Demo", "Descargar Propuesta".</text:p>
        </text:list-item>
        <text:list-item>
          <text:p text:style-name="P20"><text:span text:style-name="Strong_20_Emphasis">Texto:</text:span> <text:span text:style-name="Source_20_Text">Dark Grey</text:span> (#1A1A1A) para documentos claros; <text:span text:style-name="Source_20_Text">White/Light Grey</text:span> para interfaces oscuras.</text:p>
        </text:list-item>
        <text:list-item>
          <text:p text:style-name="P5"><text:span text:style-name="Strong_20_Emphasis">Semáforo (Producto):</text:span> Mantener estrictamente los neones del dashboard (Emerald, Amber, Red) solo dentro de la app.</text:p>
        </text:list-item>
      </text:list>
      <text:h text:style-name="Heading_20_3" text:outline-level="3">2.2 Tipografía</text:h>
      <text:list xml:id="list2081045322" text:style-name="L2">
        <text:list-item>
          <text:p text:style-name="P21"><text:span text:style-name="Strong_20_Emphasis">Externa (Docs/Web):</text:span> <text:span text:style-name="Source_20_Text">Montserrat</text:span> (Títulos) + <text:span text:style-name="Source_20_Text">Roboto</text:span> (Cuerpo). <text:span text:style-name="Emphasis">Fallback: Arial/Calibri.</text:span></text:p>
        </text:list-item>
        <text:list-item>
          <text:p text:style-name="P6"><text:span text:style-name="Strong_20_Emphasis">Interna (Dashboard):</text:span> <text:span text:style-name="Source_20_Text">Space Grotesk</text:span> (Títulos) + <text:span text:style-name="Source_20_Text">JetBrains Mono</text:span> (Datos). <text:span text:style-name="Emphasis">No cambiar.</text:span></text:p>
        </text:list-item>
      </text:list>
      <text:h text:style-name="Heading_20_3" text:outline-level="3"><text:soft-page-break/>2.3 Logo y Activos</text:h>
      <text:list xml:id="list3351256586" text:style-name="L3">
        <text:list-item>
          <text:p text:style-name="P22"><text:span text:style-name="Strong_20_Emphasis">Logo Principal:</text:span> Versión horizontal sobre fondo claro (para PDFs y Web).</text:p>
        </text:list-item>
        <text:list-item>
          <text:p text:style-name="P22"><text:span text:style-name="Strong_20_Emphasis">Logo Inverso:</text:span> Versión blanca sobre fondo Navy (para Presentaciones y Header de Emails).</text:p>
        </text:list-item>
        <text:list-item>
          <text:p text:style-name="P7"><text:span text:style-name="Strong_20_Emphasis">Iconografía:</text:span> Línea fina (1.5px) para documentos; Iconos rellenos/neón para el dashboard.</text:p>
        </text:list-item>
      </text:list>
      <text:p text:style-name="Horizontal_20_Line"/>
      <text:h text:style-name="Heading_20_2" text:outline-level="2">3. KIT DE VENTAS DIGITAL (REEMPLAZA PAPELERÍA FÍSICA)</text:h>
      <text:p text:style-name="Text_20_body"><text:span text:style-name="Emphasis">Objetivo: Cero impresión costosa. Todo es digital, interactivo y actualizable en tiempo real.</text:span></text:p>
      <text:h text:style-name="Heading_20_3" text:outline-level="3">3.1 La "One-Pager" Interactiva (PDF)</text:h>
      <text:p text:style-name="Text_20_body">Reemplaza al folder físico y al brochure impreso.</text:p>
      <text:list xml:id="list840203060" text:style-name="L4">
        <text:list-item>
          <text:p text:style-name="P23"><text:span text:style-name="Strong_20_Emphasis">Formato:</text:span> PDF de 1 página (max 2MB), optimizado para móvil.</text:p>
        </text:list-item>
        <text:list-item>
          <text:p text:style-name="P23"><text:span text:style-name="Strong_20_Emphasis">Contenido:</text:span></text:p>
          <text:list>
            <text:list-item>
              <text:p text:style-name="P23">Header con Logo + Tagline ("Inteligencia de Medios para Decisiones Estratégicas").</text:p>
            </text:list-item>
            <text:list-item>
              <text:p text:style-name="P23">3 Pilares de Valor (Datos Reales, Ahorro de Tiempo, Ventaja Competitiva).</text:p>
            </text:list-item>
            <text:list-item>
              <text:p text:style-name="P23"><text:span text:style-name="Strong_20_Emphasis">QR Dinámico:</text:span> Enlace directo a una demo grabada o al login de prueba.</text:p>
            </text:list-item>
            <text:list-item>
              <text:p text:style-name="P23">Footer con datos de contacto mínimos.</text:p>
            </text:list-item>
          </text:list>
        </text:list-item>
        <text:list-item>
          <text:p text:style-name="P8"><text:span text:style-name="Strong_20_Emphasis">Generación:</text:span> Plantilla maestra en Canva/Google Slides exportable a PDF.</text:p>
        </text:list-item>
      </text:list>
      <text:h text:style-name="Heading_20_3" text:outline-level="3">3.2 Propuesta Comercial "Viva"</text:h>
      <text:p text:style-name="Text_20_body">Reemplaza la carta estática en Word.</text:p>
      <text:list xml:id="list216198367" text:style-name="L5">
        <text:list-item>
          <text:p text:style-name="P24"><text:span text:style-name="Strong_20_Emphasis">Estructura:</text:span></text:p>
          <text:list>
            <text:list-item>
              <text:p text:style-name="P24"><text:span text:style-name="Strong_20_Emphasis">Portada:</text:span> Nombre del cliente + Fecha + "Confidencial".</text:p>
            </text:list-item>
            <text:list-item>
              <text:p text:style-name="P24"><text:span text:style-name="Strong_20_Emphasis">Diagnóstico:</text:span> 3 bullets con los dolores específicos detectados en la reunión.</text:p>
            </text:list-item>
            <text:list-item>
              <text:p text:style-name="P24"><text:span text:style-name="Strong_20_Emphasis">Solución:</text:span> Capturas de pantalla REALES del dashboard del cliente (si ya tiene acceso beta) o mocks personalizados.</text:p>
            </text:list-item>
            <text:list-item>
              <text:p text:style-name="P24"><text:span text:style-name="Strong_20_Emphasis">Inversión:</text:span> Tabla clara con opciones (Plan Starter, Growth, Institutional).</text:p>
            </text:list-item>
            <text:list-item>
              <text:p text:style-name="P24"><text:span text:style-name="Strong_20_Emphasis">Firma Digital:</text:span> Espacio para firma electrónica o aprobación por email.</text:p>
            </text:list-item>
          </text:list>
        </text:list-item>
        <text:list-item>
          <text:p text:style-name="P9"><text:span text:style-name="Strong_20_Emphasis">Entrega:</text:span> Email con asunto personalizado + Link de seguimiento (ej. DocSend o similar) para saber cuándo lo abren.</text:p>
        </text:list-item>
      </text:list>
      <text:h text:style-name="Heading_20_3" text:outline-level="3">3.3 Firma de Email Corporativa (HTML Ligero)</text:h>
      <text:list xml:id="list642264400" text:style-name="L6">
        <text:list-item>
          <text:p text:style-name="P25"><text:span text:style-name="Strong_20_Emphasis">Diseño:</text:span> Limpio, sin imágenes pesadas, compatible con Outlook/Gmail.</text:p>
        </text:list-item>
        <text:list-item>
          <text:p text:style-name="P25"><text:span text:style-name="Strong_20_Emphasis">Elementos:</text:span></text:p>
          <text:list>
            <text:list-item>
              <text:p text:style-name="P25">Logo pequeño (40px alto).</text:p>
            </text:list-item>
            <text:list-item>
              <text:p text:style-name="P25">Nombre (Montserrat Bold) + Cargo (Roboto, color Navy).</text:p>
            </text:list-item>
            <text:list-item>
              <text:p text:style-name="P25">Línea separadora fina Naranja.</text:p>
            </text:list-item>
            <text:list-item>
              <text:p text:style-name="P25">Iconos simples (Tel, Email, LinkedIn) + Enlace a "Solicitar Demo".</text:p>
            </text:list-item>
            <text:list-item>
              <text:p text:style-name="P10"><text:soft-page-break/><text:span text:style-name="Emphasis">Sin banners promocionales pesados.</text:span></text:p>
            </text:list-item>
          </text:list>
        </text:list-item>
      </text:list>
      <text:h text:style-name="Heading_20_3" text:outline-level="3">3.4 Deck de Ventas (Presentación Modular)</text:h>
      <text:list xml:id="list1488123263" text:style-name="L7">
        <text:list-item>
          <text:p text:style-name="P26"><text:span text:style-name="Strong_20_Emphasis">Formato:</text:span> Google Slides / PowerPoint (16:9).</text:p>
        </text:list-item>
        <text:list-item>
          <text:p text:style-name="P26"><text:span text:style-name="Strong_20_Emphasis">Diapositivas Maestras:</text:span></text:p>
          <text:list>
            <text:list-item>
              <text:p text:style-name="P26"><text:span text:style-name="Strong_20_Emphasis">Portada Navy:</text:span> Logo blanco, título impactante.</text:p>
            </text:list-item>
            <text:list-item>
              <text:p text:style-name="P26"><text:span text:style-name="Strong_20_Emphasis">El Problema:</text:span> Datos duros (ej. "4 horas/día perdidas en monitoreo manual").</text:p>
            </text:list-item>
            <text:list-item>
              <text:p text:style-name="P26"><text:span text:style-name="Strong_20_Emphasis">La Solución (Video):</text:span> Embed de video de 30 seg mostrando el dashboard Sci-Fi en acción.</text:p>
            </text:list-item>
            <text:list-item>
              <text:p text:style-name="P26"><text:span text:style-name="Strong_20_Emphasis">Casos de Uso:</text:span> 3 ejemplos reales (Gobierno, Minería, ONG).</text:p>
            </text:list-item>
            <text:list-item>
              <text:p text:style-name="P26"><text:span text:style-name="Strong_20_Emphasis">Precios:</text:span> Tabla simple de 3 columnas.</text:p>
            </text:list-item>
            <text:list-item>
              <text:p text:style-name="P11"><text:span text:style-name="Strong_20_Emphasis">Cierre:</text:span> QR grande para agendar reunión inmediatamente.</text:p>
            </text:list-item>
          </text:list>
        </text:list-item>
      </text:list>
      <text:p text:style-name="Horizontal_20_Line"/>
      <text:h text:style-name="Heading_20_2" text:outline-level="2">4. ESTRATEGIA DE CONTENIDO: "EL PRODUCTO ES EL MARKETING"</text:h>
      <text:p text:style-name="Text_20_body"><text:span text:style-name="Emphasis">En lugar de inventar contenido, usamos los datos de ONION200 para generar autoridad.</text:span></text:p>
      <text:h text:style-name="Heading_20_3" text:outline-level="3">4.1 El "Micro-Insight" Semanal (LinkedIn)</text:h>
      <text:list xml:id="list3038307556" text:style-name="L8">
        <text:list-item>
          <text:p text:style-name="P27"><text:span text:style-name="Strong_20_Emphasis">Fuente:</text:span> Un gráfico o dato real extraído del dashboard esa semana.</text:p>
        </text:list-item>
        <text:list-item>
          <text:p text:style-name="P27"><text:span text:style-name="Strong_20_Emphasis">Formato:</text:span> Imagen cuadrada (1080x1080) con el estilo visual del dashboard (fondo oscuro, gráfico neón) pero con texto legible en blanco.</text:p>
        </text:list-item>
        <text:list-item>
          <text:p text:style-name="P27"><text:span text:style-name="Strong_20_Emphasis">Copy:</text:span> "Esta semana detectamos un pico del 300% en menciones sobre [Tema] en medios estatales. ¿Qué significa esto para su sector? [Link al artículo/demo]."</text:p>
        </text:list-item>
        <text:list-item>
          <text:p text:style-name="P12"><text:span text:style-name="Strong_20_Emphasis">Frecuencia:</text:span> 1 vez por semana (Calidad &gt; Cantidad).</text:p>
        </text:list-item>
      </text:list>
      <text:h text:style-name="Heading_20_3" text:outline-level="3">4.2 Reporte de Muestra Automatizado</text:h>
      <text:list xml:id="list334027499" text:style-name="L9">
        <text:list-item>
          <text:p text:style-name="P28"><text:span text:style-name="Strong_20_Emphasis">Mecánica:</text:span> Cuando un prospecto pide info, el sistema genera automáticamente un mini-reporte PDF con datos reales de los últimos 3 días sobre <text:span text:style-name="Emphasis">su</text:span> organización o competencia.</text:p>
        </text:list-item>
        <text:list-item>
          <text:p text:style-name="P13"><text:span text:style-name="Strong_20_Emphasis">Impacto:</text:span> "Mira lo que encontramos sobre ti en las últimas 48 horas". Es el cierre de venta más potente.</text:p>
        </text:list-item>
      </text:list>
      <text:p text:style-name="Horizontal_20_Line"/>
      <text:h text:style-name="Heading_20_2" text:outline-level="2">5. FLUJO DE VENTA ÁGIL (SIN RIGIDEZ)</text:h>
      <text:h text:style-name="Heading_20_3" text:outline-level="3">Fase 1: Contacto (Digital)</text:h>
      <text:list xml:id="list3217571285" text:style-name="L10">
        <text:list-item>
          <text:p text:style-name="P29">Email frío o LinkedIn con la <text:span text:style-name="Strong_20_Emphasis">One-Pager</text:span>.</text:p>
        </text:list-item>
        <text:list-item>
          <text:p text:style-name="P14">Objetivo: Conseguir una reunión de 15 min.</text:p>
        </text:list-item>
      </text:list>
      <text:h text:style-name="Heading_20_3" text:outline-level="3"><text:soft-page-break/>Fase 2: Demo (El Momento de la Verdad)</text:h>
      <text:list xml:id="list172349011" text:style-name="L11">
        <text:list-item>
          <text:p text:style-name="P30">Mostrar el <text:span text:style-name="Strong_20_Emphasis">Dashboard Sci-Fi</text:span> en vivo.</text:p>
        </text:list-item>
        <text:list-item>
          <text:p text:style-name="P30">Usar datos reales del sector del cliente.</text:p>
        </text:list-item>
        <text:list-item>
          <text:p text:style-name="P15">No hablar de características técnicas, hablar de <text:span text:style-name="Strong_20_Emphasis">alertas y decisiones</text:span>.</text:p>
        </text:list-item>
      </text:list>
      <text:h text:style-name="Heading_20_3" text:outline-level="3">Fase 3: Propuesta (Inmediata)</text:h>
      <text:list xml:id="list1105635435" text:style-name="L12">
        <text:list-item>
          <text:p text:style-name="P31">Enviar la <text:span text:style-name="Strong_20_Emphasis">Propuesta Comercial Viva</text:span> en menos de 24h post-reunión.</text:p>
        </text:list-item>
        <text:list-item>
          <text:p text:style-name="P16">Incluir un link de pago o contrato digital.</text:p>
        </text:list-item>
      </text:list>
      <text:h text:style-name="Heading_20_3" text:outline-level="3">Fase 4: Onboarding (Automatizado)</text:h>
      <text:list xml:id="list1869149946" text:style-name="L13">
        <text:list-item>
          <text:p text:style-name="P32">Acceso inmediato a la plataforma.</text:p>
        </text:list-item>
        <text:list-item>
          <text:p text:style-name="P17">Email de bienvenida con video-tutorial de 2 min.</text:p>
        </text:list-item>
      </text:list>
      <text:p text:style-name="Horizontal_20_Line"/>
      <text:h text:style-name="Heading_20_2" text:outline-level="2">6. PROMPT EJECUTIVO PARA EL EQUIPO COMERCIAL (ACTUALIZADO)</text:h>
      <text:p text:style-name="Quotations"><text:span text:style-name="Strong_20_Emphasis">ROL:</text:span> Eres Agente Comercial de DECODEX Bolivia. <text:span text:style-name="Strong_20_Emphasis">MISIÓN:</text:span> Vender inteligencia de medios usando activos digitales ágiles y datos reales. <text:span text:style-name="Strong_20_Emphasis">REGLAS:</text:span></text:p>
      <text:list xml:id="list944984024" text:style-name="L14">
        <text:list-item>
          <text:p text:style-name="P2"><text:span text:style-name="Strong_20_Emphasis">Identidad Dual:</text:span> Usa lenguaje corporativo y PDFs limpios (Capa A) para vender. Promete una experiencia tecnológica futurista (Capa B) para cerrar.</text:p>
        </text:list-item>
        <text:list-item>
          <text:p text:style-name="P2"><text:span text:style-name="Strong_20_Emphasis">Cero Papel:</text:span> No imprimas nada salvo contratos legales firmados. Todo es PDF interactivo o enlace.</text:p>
        </text:list-item>
        <text:list-item>
          <text:p text:style-name="P2"><text:span text:style-name="Strong_20_Emphasis">Datos Reales:</text:span> Nunca vendas con promesas vagas. Usa screenshots reales del dashboard o micro-reportes generados por ONION200.</text:p>
        </text:list-item>
        <text:list-item>
          <text:p text:style-name="P2"><text:span text:style-name="Strong_20_Emphasis">Agilidad:</text:span> Si un cliente pide un formato específico, adáptalo rápido usando las plantillas maestras, no esperes aprobación de "branding".</text:p>
        </text:list-item>
        <text:list-item>
          <text:p text:style-name="P1"><text:span text:style-name="Strong_20_Emphasis">Seguimiento:</text:span> Usa la firma de email estándar y agenda follow-ups automáticos a las 24h y 48h.</text:p>
        </text:list-item>
      </text:list>
      <text:p text:style-name="Horizontal_20_Line"/>
      <text:h text:style-name="Heading_20_2" text:outline-level="2">7. PRÓXIMOS PASOS (IMPLEMENTACIÓN INMEDIATA)</text:h>
      <text:list xml:id="list2580852921" text:style-name="L15">
        <text:list-item>
          <text:p text:style-name="P33"><text:span text:style-name="Strong_20_Emphasis">Actualizar Firmas de Email:</text:span> Configurar el HTML ligero en las cuentas del equipo.</text:p>
        </text:list-item>
        <text:list-item>
          <text:p text:style-name="P33"><text:span text:style-name="Strong_20_Emphasis">Crear Plantilla One-Pager:</text:span> Diseñar el PDF único en Canva/Slides con la nueva estética híbrida.</text:p>
        </text:list-item>
        <text:list-item>
          <text:p text:style-name="P33"><text:span text:style-name="Strong_20_Emphasis">Grabar Demo Maestra:</text:span> Video de 60 segundos mostrando el dashboard Sci-Fi resolviendo un problema real.</text:p>
        </text:list-item>
        <text:list-item>
          <text:p text:style-name="P33"><text:span text:style-name="Strong_20_Emphasis">Configurar Generador de Muestras:</text:span> Automatizar la creación de mini-reportes PDF para prospectos.</text:p>
        </text:list-item>
        <text:list-item>
          <text:p text:style-name="P18"><text:span text:style-name="Strong_20_Emphasis">Limpieza de LinkedIn:</text:span> Actualizar perfiles del equipo con la nueva bio y banner híbrido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14:58:53.879132970</meta:creation-date>
    <dc:date>2026-05-15T14:59:24.566430237</dc:date>
    <meta:editing-duration>PT31S</meta:editing-duration>
    <meta:editing-cycles>1</meta:editing-cycles>
    <meta:document-statistic meta:table-count="1" meta:image-count="0" meta:object-count="0" meta:page-count="5" meta:paragraph-count="106" meta:word-count="1057" meta:character-count="6818" meta:non-whitespace-character-count="5929"/>
    <meta:generator>LibreOffice/7.0.4.2$Linux_X86_64 LibreOffice_project/00$Build-2</meta:generator>
  </office:meta>
</office:document-meta>
</file>